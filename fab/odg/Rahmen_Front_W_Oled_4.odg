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withoutfill">
      <style:graphic-properties svg:stroke-width="0.05cm" draw:marker-start-width="0.275cm" draw:marker-end-width="0.275cm" draw:fill="solid" draw:fill-color="#808080" draw:textarea-vertical-align="middle" fo:padding-top="0.15cm" fo:padding-bottom="0.15cm" fo:padding-left="0.275cm" fo:padding-right="0.275cm" loext:decorative="false"/>
    </style:style>
    <style:style style:name="gr3" style:family="graphic" style:parent-style-name="standard">
      <style:graphic-properties draw:fill="solid" draw:fill-color="#ffffff" loext:fill-use-slide-background="false" draw:textarea-horizontal-align="justify" draw:textarea-vertical-align="middle" draw:auto-grow-height="false" fo:min-height="0.65cm" fo:min-width="1.1cm" loext:decorative="false"/>
    </style:style>
    <style:style style:name="gr4" style:family="graphic" style:parent-style-name="standard">
      <style:graphic-properties draw:fill="solid" draw:fill-color="#ffffff" loext:fill-use-slide-background="false" draw:textarea-horizontal-align="justify" draw:textarea-vertical-align="middle" draw:auto-grow-height="false" fo:min-height="0.55cm" fo:min-width="0.3cm" loext:decorative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808080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polygon draw:style-name="gr2" draw:text-style-name="P1" draw:layer="layout" svg:width="1.585cm" svg:height="4.982cm" draw:transform="rotate (-1.48771865439997) translate (6.3662584259705cm 0.994789907669393cm)" svg:viewBox="0 0 1586 4983" draw:points="0,4883 1196,4983 1586,299 888,241 897,141 1096,158 1104,58 407,0">
            <text:p/>
          </draw:polygon>
          <draw:custom-shape draw:style-name="gr3" draw:text-style-name="P2" draw:layer="layout" svg:width="1.6cm" svg:height="0.9cm" svg:x="2.1cm" svg:y="1.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8cm" svg:height="0.8cm" svg:x="4cm" svg:y="1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8cm" svg:height="0.8cm" svg:x="5cm" svg:y="1.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0.1cm" svg:height="0.1cm" svg:x="1.75cm" svg:y="1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1cm" svg:height="0.1cm" svg:x="6.25cm" svg:y="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olygon draw:style-name="gr2" draw:text-style-name="P1" draw:layer="layout" svg:width="1.585cm" svg:height="4.982cm" draw:transform="rotate (-1.48771865439997) translate (6.3662584259705cm 0.994789907669393cm)" svg:viewBox="0 0 1586 4983" draw:points="0,4883 1196,4983 1586,299 888,241 897,141 1096,158 1104,58 407,0">
          <text:p/>
        </draw:polygon>
        <draw:custom-shape draw:style-name="gr3" draw:text-style-name="P2" draw:layer="layout" svg:width="1.6cm" svg:height="0.9cm" svg:x="2.1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cm" svg:height="0.8cm" svg:x="5cm" svg:y="1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1cm" svg:height="0.1cm" svg:x="1.75cm" svg:y="1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cm" svg:height="0.1cm" svg:x="6.25cm" svg:y="1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8cm" svg:x="5.2cm" svg:y="1.7cm">
          <draw:text-box>
            <text:p>4</text:p>
          </draw:text-box>
        </draw:frame>
        <draw:frame draw:style-name="gr6" draw:text-style-name="P3" draw:layer="layout" svg:width="1.2cm" svg:height="0.8cm" svg:x="2.3cm" svg:y="1.7cm">
          <draw:text-box>
            <text:p>Ol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05T16:11:41.805089000</meta:creation-date>
    <dc:date>2026-04-05T16:13:19.058960800</dc:date>
    <meta:editing-duration>PT1M37S</meta:editing-duration>
    <meta:editing-cycles>1</meta:editing-cycles>
    <meta:document-statistic meta:object-count="14"/>
    <meta:generator>LibreOffice/26.2.2.2$Windows_X86_64 LibreOffice_project/1f77d10d6938fd34972958f64b2bcfa54f8b1ba5</meta:generator>
  </office:meta>
</office:document-meta>
</file>